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7.803cm"/>
    </style:style>
    <style:style style:name="Таблица1.B" style:family="table-column">
      <style:table-column-properties style:column-width="9.197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" style:family="table">
      <style:table-properties style:width="16.702cm" table:align="left"/>
    </style:style>
    <style:style style:name="Таблица2.A" style:family="table-column">
      <style:table-column-properties style:column-width="8.209cm"/>
    </style:style>
    <style:style style:name="Таблица2.B" style:family="table-column">
      <style:table-column-properties style:column-width="8.493cm"/>
    </style:style>
    <style:style style:name="Таблица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3.824cm"/>
    </style:style>
    <style:style style:name="Таблица3.B" style:family="table-column">
      <style:table-column-properties style:column-width="7.163cm"/>
    </style:style>
    <style:style style:name="Таблица3.C" style:family="table-column">
      <style:table-column-properties style:column-width="6.013cm"/>
    </style:style>
    <style:style style:name="Таблица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4.927cm"/>
    </style:style>
    <style:style style:name="Таблица4.B" style:family="table-column">
      <style:table-column-properties style:column-width="12.074cm"/>
    </style:style>
    <style:style style:name="Таблица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3.933cm"/>
    </style:style>
    <style:style style:name="Таблица5.B" style:family="table-column">
      <style:table-column-properties style:column-width="13.067cm"/>
    </style:style>
    <style:style style:name="Таблица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" style:family="table">
      <style:table-properties style:width="14.949cm" table:align="left"/>
    </style:style>
    <style:style style:name="Таблица6.A" style:family="table-column">
      <style:table-column-properties style:column-width="5.719cm"/>
    </style:style>
    <style:style style:name="Таблица6.B" style:family="table-column">
      <style:table-column-properties style:column-width="9.23cm"/>
    </style:style>
    <style:style style:name="Таблица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" style:family="table">
      <style:table-properties style:width="14.831cm" table:align="left"/>
    </style:style>
    <style:style style:name="Таблица7.A" style:family="table-column">
      <style:table-column-properties style:column-width="6.322cm"/>
    </style:style>
    <style:style style:name="Таблица7.B" style:family="table-column">
      <style:table-column-properties style:column-width="8.509cm"/>
    </style:style>
    <style:style style:name="Таблица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5.962cm"/>
    </style:style>
    <style:style style:name="Таблица8.B" style:family="table-column">
      <style:table-column-properties style:column-width="11.038cm"/>
    </style:style>
    <style:style style:name="Таблица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" style:family="table">
      <style:table-properties style:width="9.721cm" table:align="left"/>
    </style:style>
    <style:style style:name="Таблица9.A" style:family="table-column">
      <style:table-column-properties style:column-width="5.034cm"/>
    </style:style>
    <style:style style:name="Таблица9.B" style:family="table-column">
      <style:table-column-properties style:column-width="4.687cm"/>
    </style:style>
    <style:style style:name="Таблица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" style:family="table">
      <style:table-properties style:width="12.67cm" table:align="left"/>
    </style:style>
    <style:style style:name="Таблица10.A" style:family="table-column">
      <style:table-column-properties style:column-width="6.221cm"/>
    </style:style>
    <style:style style:name="Таблица10.B" style:family="table-column">
      <style:table-column-properties style:column-width="6.449cm"/>
    </style:style>
    <style:style style:name="Таблица1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" style:family="table">
      <style:table-properties style:width="16.815cm" table:align="left"/>
    </style:style>
    <style:style style:name="Таблица11.A" style:family="table-column">
      <style:table-column-properties style:column-width="4.561cm"/>
    </style:style>
    <style:style style:name="Таблица11.B" style:family="table-column">
      <style:table-column-properties style:column-width="12.254cm"/>
    </style:style>
    <style:style style:name="Таблица1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" style:family="table">
      <style:table-properties style:width="14.566cm" table:align="left"/>
    </style:style>
    <style:style style:name="Таблица12.A" style:family="table-column">
      <style:table-column-properties style:column-width="3.316cm"/>
    </style:style>
    <style:style style:name="Таблица12.B" style:family="table-column">
      <style:table-column-properties style:column-width="11.25cm"/>
    </style:style>
    <style:style style:name="Таблица1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" style:family="table">
      <style:table-properties style:width="9.073cm" table:align="left"/>
    </style:style>
    <style:style style:name="Таблица13.A" style:family="table-column">
      <style:table-column-properties style:column-width="2.383cm"/>
    </style:style>
    <style:style style:name="Таблица13.B" style:family="table-column">
      <style:table-column-properties style:column-width="2.817cm"/>
    </style:style>
    <style:style style:name="Таблица13.C" style:family="table-column">
      <style:table-column-properties style:column-width="3.874cm"/>
    </style:style>
    <style:style style:name="Таблица1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" style:family="table">
      <style:table-properties style:width="9.103cm" table:align="left"/>
    </style:style>
    <style:style style:name="Таблица14.A" style:family="table-column">
      <style:table-column-properties style:column-width="3.958cm"/>
    </style:style>
    <style:style style:name="Таблица14.B" style:family="table-column">
      <style:table-column-properties style:column-width="5.145cm"/>
    </style:style>
    <style:style style:name="Таблица1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5" style:family="table">
      <style:table-properties style:width="17cm" table:align="left"/>
    </style:style>
    <style:style style:name="Таблица15.A" style:family="table-column">
      <style:table-column-properties style:column-width="5.8cm"/>
    </style:style>
    <style:style style:name="Таблица15.B" style:family="table-column">
      <style:table-column-properties style:column-width="11.201cm"/>
    </style:style>
    <style:style style:name="Таблица1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6" style:family="table">
      <style:table-properties style:width="17cm" table:align="left"/>
    </style:style>
    <style:style style:name="Таблица16.A" style:family="table-column">
      <style:table-column-properties style:column-width="4.736cm"/>
    </style:style>
    <style:style style:name="Таблица16.B" style:family="table-column">
      <style:table-column-properties style:column-width="12.264cm"/>
    </style:style>
    <style:style style:name="Таблица1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7" style:family="table">
      <style:table-properties style:width="17cm" table:align="left"/>
    </style:style>
    <style:style style:name="Таблица17.A" style:family="table-column">
      <style:table-column-properties style:column-width="4.918cm"/>
    </style:style>
    <style:style style:name="Таблица17.B" style:family="table-column">
      <style:table-column-properties style:column-width="12.083cm"/>
    </style:style>
    <style:style style:name="Таблица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Heading_20_1">
      <style:paragraph-properties fo:margin-left="0cm" fo:margin-right="0cm" fo:margin-top="0.847cm" fo:margin-bottom="0.423cm" style:contextual-spacing="false" style:line-height-at-least="0.9cm" fo:orphans="2" fo:widows="2" fo:text-indent="0cm" style:auto-text-indent="false"/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1cm" fo:margin-right="1cm" fo:margin-top="0cm" fo:margin-bottom="0cm" style:contextual-spacing="false" fo:orphans="2" fo:widows="2" fo:text-indent="0cm" style:auto-text-indent="false" fo:padding-left="0.37cm" fo:padding-right="0cm" fo:padding-top="0cm" fo:padding-bottom="0cm" fo:border-left="0.74pt solid #adb2b8" fo:border-right="none" fo:border-top="none" fo:border-bottom="none"/>
    </style:style>
    <style:style style:name="P5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fo:letter-spacing="normal"/>
    </style:style>
    <style:style style:name="P6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7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8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9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10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</style:style>
    <style:style style:name="P11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/>
    </style:style>
    <style:style style:name="P12" style:family="paragraph" style:parent-style-name="Table_20_Contents">
      <style:paragraph-properties style:line-height-at-least="0.661cm"/>
      <style:text-properties fo:font-variant="normal" fo:text-transform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fo:letter-spacing="normal"/>
    </style:style>
    <style:style style:name="P15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16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17" style:family="paragraph" style:parent-style-name="Text_20_body">
      <style:paragraph-properties fo:margin-left="0.212cm" fo:margin-right="0cm" style:line-height-at-least="0.476cm" fo:text-indent="0cm" style:auto-text-indent="false"/>
      <style:text-properties fo:font-variant="normal" fo:text-transform="none" fo:color="#0f1115" loext:opacity="100%" style:font-name="Menlo" fo:font-size="9pt" fo:font-style="normal" fo:font-weight="normal" fo:background-color="#ffffff" loext:padding="0cm" loext:border="none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22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</style:style>
    <style:style style:name="P2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</style:style>
    <style:style style:name="P25" style:family="paragraph" style:parent-style-name="Standard">
      <style:text-properties officeooo:rsid="000ba5c8" officeooo:paragraph-rsid="000ba5c8"/>
    </style:style>
    <style:style style:name="P26" style:family="paragraph" style:parent-style-name="Heading_20_2">
      <style:text-properties fo:font-variant="normal" fo:text-transform="none" fo:color="#0f1115" loext:opacity="100%" fo:letter-spacing="normal" officeooo:rsid="000ba5c8" officeooo:paragraph-rsid="000ba5c8"/>
    </style:style>
    <style:style style:name="P27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 officeooo:rsid="000ba5c8"/>
    </style:style>
    <style:style style:name="P2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officeooo:rsid="000ba5c8"/>
    </style:style>
    <style:style style:name="P29" style:family="paragraph" style:parent-style-name="Horizontal_20_Line">
      <style:text-properties officeooo:rsid="000ba5c8"/>
    </style:style>
    <style:style style:name="P3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0ba5c8"/>
    </style:style>
    <style:style style:name="P31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officeooo:rsid="000ba5c8"/>
    </style:style>
    <style:style style:name="P32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0ba5c8"/>
    </style:style>
    <style:style style:name="P33" style:family="paragraph" style:parent-style-name="Text_20_body">
      <style:paragraph-properties fo:margin-left="0.212cm" fo:margin-right="0cm" style:line-height-at-least="0.476cm" fo:text-indent="0cm" style:auto-text-indent="false"/>
      <style:text-properties fo:font-variant="normal" fo:text-transform="none" fo:color="#0f1115" loext:opacity="100%" style:font-name="Menlo" fo:font-size="9pt" fo:font-style="normal" fo:font-weight="normal" officeooo:rsid="000ba5c8" fo:background-color="#ffffff" loext:padding="0cm" loext:border="none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 officeooo:rsid="000ba5c8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 officeooo:rsid="000ba5c8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officeooo:rsid="000ba5c8"/>
    </style:style>
    <style:style style:name="P37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fo:letter-spacing="normal" officeooo:rsid="000ba5c8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0ba5c8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ba5c8"/>
    </style:style>
    <style:style style:name="P40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  <style:text-properties officeooo:rsid="000ba5c8"/>
    </style:style>
    <style:style style:name="P41" style:family="paragraph" style:parent-style-name="Standard">
      <style:text-properties officeooo:rsid="000d5dc3" officeooo:paragraph-rsid="000d5dc3"/>
    </style:style>
    <style:style style:name="P42" style:family="paragraph" style:parent-style-name="Heading_20_2">
      <style:text-properties fo:font-variant="normal" fo:text-transform="none" fo:color="#0f1115" loext:opacity="100%" style:font-name="quote-cjk-patch" fo:font-size="16.5pt" fo:letter-spacing="normal" fo:font-style="normal" fo:font-weight="bold" officeooo:rsid="000d5dc3" officeooo:paragraph-rsid="000d5dc3"/>
    </style:style>
    <style:style style:name="P4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 officeooo:rsid="000d5dc3"/>
    </style:style>
    <style:style style:name="P4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officeooo:rsid="000d5dc3"/>
    </style:style>
    <style:style style:name="P45" style:family="paragraph" style:parent-style-name="Horizontal_20_Line">
      <style:text-properties officeooo:rsid="000d5dc3"/>
    </style:style>
    <style:style style:name="P46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0d5dc3"/>
    </style:style>
    <style:style style:name="P47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officeooo:rsid="000d5dc3"/>
    </style:style>
    <style:style style:name="P48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0d5dc3"/>
    </style:style>
    <style:style style:name="P49" style:family="paragraph" style:parent-style-name="Text_20_body">
      <style:paragraph-properties fo:margin-left="0.212cm" fo:margin-right="0cm" style:line-height-at-least="0.476cm" fo:text-indent="0cm" style:auto-text-indent="false"/>
      <style:text-properties fo:font-variant="normal" fo:text-transform="none" fo:color="#0f1115" loext:opacity="100%" style:font-name="Menlo" fo:font-size="9pt" fo:font-style="normal" fo:font-weight="normal" officeooo:rsid="000d5dc3" fo:background-color="#ffffff" loext:padding="0cm" loext:border="none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 officeooo:rsid="000d5dc3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 officeooo:rsid="000d5dc3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officeooo:rsid="000d5dc3"/>
    </style:style>
    <style:style style:name="P53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fo:letter-spacing="normal" officeooo:rsid="000d5dc3"/>
    </style:style>
    <style:style style:name="P54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0d5dc3"/>
    </style:style>
    <style:style style:name="P55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d5dc3"/>
    </style:style>
    <style:style style:name="P56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  <style:text-properties officeooo:rsid="000d5dc3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3" style:family="text">
      <style:text-properties fo:font-variant="normal" fo:text-transform="none" fo:color="#0f1115" loext:opacity="100%" fo:letter-spacing="normal"/>
    </style:style>
    <style:style style:name="T4" style:family="text">
      <style:text-properties style:font-name="quote-cjk-patch" fo:font-size="16.5pt" fo:font-style="normal" fo:font-weight="bold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style:font-name="quote-cjk-patch" fo:font-size="11.25pt" fo:font-style="normal" fo:font-weight="bold"/>
    </style:style>
    <style:style style:name="T7" style:family="text">
      <style:text-properties style:font-name="quote-cjk-patch" fo:font-size="11.25pt" fo:font-style="normal" fo:font-weight="normal"/>
    </style:style>
    <style:style style:name="T8" style:family="text">
      <style:text-properties fo:font-variant="normal" fo:text-transform="none" fo:color="#ff0000" loext:opacity="100%" style:font-name="quote-cjk-patch" fo:font-size="12pt" fo:letter-spacing="normal" fo:font-style="normal" fo:font-weight="bold" style:font-weight-asian="bold" style:font-weight-complex="bold"/>
    </style:style>
    <style:style style:name="T9" style:family="text">
      <style:text-properties style:font-name="quote-cjk-patch" fo:font-size="15pt" fo:font-style="normal" fo:font-weight="bold"/>
    </style:style>
    <style:style style:name="T10" style:family="text">
      <style:text-properties fo:font-variant="normal" fo:text-transform="none" style:font-name="quote-cjk-patch" fo:font-size="11.25pt" fo:font-style="normal" fo:font-weight="normal"/>
    </style:style>
    <style:style style:name="T11" style:family="text">
      <style:text-properties fo:font-variant="normal" fo:text-transform="none" style:font-name="Menlo" fo:font-size="9.75pt" fo:font-style="normal" fo:font-weight="normal" fo:background-color="#ebeef2" loext:char-shading-value="0" loext:padding="0cm" loext:border="none"/>
    </style:style>
    <style:style style:name="T12" style:family="text">
      <style:text-properties fo:font-variant="normal" fo:text-transform="none" fo:color="#3964fe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-left="0cm" loext:padding-right="0.049cm" loext:padding-top="0.049cm" loext:padding-bottom="0.049cm" loext:border-left="none" loext:border-right="2.24pt solid #ffffff" loext:border-top="1.5pt solid #ffffff" loext:border-bottom="1.5pt solid #ffffff"/>
    </style:style>
    <style:style style:name="T13" style:family="text">
      <style:text-properties fo:color="#4078f2" loext:opacity="100%"/>
    </style:style>
    <style:style style:name="T14" style:family="text">
      <style:text-properties fo:color="#50a14f" loext:opacity="100%"/>
    </style:style>
    <style:style style:name="T15" style:family="text">
      <style:text-properties fo:color="#383a42" loext:opacity="100%"/>
    </style:style>
    <style:style style:name="T16" style:family="text">
      <style:text-properties fo:color="#a0a1a7" loext:opacity="100%" fo:font-style="italic"/>
    </style:style>
    <style:style style:name="T17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style:style style:name="T18" style:family="text">
      <style:text-properties fo:font-variant="normal" fo:text-transform="none" fo:color="#ff0000" loext:opacity="100%" style:font-name="quote-cjk-patch" fo:font-size="12pt" fo:letter-spacing="normal" fo:font-style="normal" fo:font-weight="bold"/>
    </style:style>
    <style:style style:name="T19" style:family="text">
      <style:text-properties style:font-name="quote-cjk-patch"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NA AI – ТВОЙ ПЕРСОНАЛЬНЫЙ ИИ-АССИСТЕНТ ДЛЯ DATA SCIENCE</text:h>
      <text:h text:style-name="P2" text:outline-level="2">Что такое ANNA AI?</text:h>
      <text:p text:style-name="P3"><text:span text:style-name="Strong_20_Emphasis"><text:span text:style-name="T1">ANNA AI</text:span></text:span><text:span text:style-name="T2"> — это не обычный чат-бот. Это </text:span><text:span text:style-name="Strong_20_Emphasis"><text:span text:style-name="T1">полноценный инструмент для Data Science с голосовым управлением</text:span></text:span><text:span text:style-name="T2"> – созданный для всех, кто хочет анализировать данные, обучать модели и принимать решения в реальном времени, </text:span><text:span text:style-name="Strong_20_Emphasis"><text:span text:style-name="T1">не программируя</text:span></text:span><text:span text:style-name="T2">.</text:span></text:p>
      <text:p text:style-name="P4"><text:span text:style-name="T3">🤖 </text:span><text:span text:style-name="Emphasis"><text:span text:style-name="T2">«Машинное обучение становится доступным через голосовые команды»</text:span></text:span></text:p>
      <text:p text:style-name="Horizontal_20_Line"/>
      <text:h text:style-name="P5" text:outline-level="2">🚀 <text:span text:style-name="T4">Что делает ANNA уникальной?</text:span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6">Функция</text:p>
            </table:table-cell>
            <table:table-cell table:style-name="Таблица1.A1" office:value-type="string">
              <text:p text:style-name="P6">Описание</text:p>
            </table:table-cell>
          </table:table-row>
        </table:table-header-rows>
        <table:table-row>
          <table:table-cell table:style-name="Таблица1.A1" office:value-type="string">
            <text:p text:style-name="P7"><text:span text:style-name="T5">📊 </text:span><text:span text:style-name="Strong_20_Emphasis"><text:span text:style-name="T6">Анализ данных по голосовой команде</text:span></text:span></text:p>
          </table:table-cell>
          <table:table-cell table:style-name="Таблица1.A1" office:value-type="string">
            <text:p text:style-name="P8">«Покажи статистику» – и Анна мгновенно выполняет</text:p>
          </table:table-cell>
        </table:table-row>
        <table:table-row>
          <table:table-cell table:style-name="Таблица1.A1" office:value-type="string">
            <text:p text:style-name="P7"><text:span text:style-name="T5">🤖 </text:span><text:span text:style-name="Strong_20_Emphasis"><text:span text:style-name="T6">Автоматическое машинное обучение (AutoML)</text:span></text:span></text:p>
          </table:table-cell>
          <table:table-cell table:style-name="Таблица1.A1" office:value-type="string">
            <text:p text:style-name="P8">9 моделей, автоматический выбор, метрики, важность признаков</text:p>
          </table:table-cell>
        </table:table-row>
        <table:table-row>
          <table:table-cell table:style-name="Таблица1.A1" office:value-type="string">
            <text:p text:style-name="P7"><text:span text:style-name="T5">🎤 </text:span><text:span text:style-name="Strong_20_Emphasis"><text:span text:style-name="T6">Полное голосовое управление</text:span></text:span></text:p>
          </table:table-cell>
          <table:table-cell table:style-name="Таблица1.A1" office:value-type="string">
            <text:p text:style-name="P8">Более 50 команд – Анна слушает и действует</text:p>
          </table:table-cell>
        </table:table-row>
        <table:table-row>
          <table:table-cell table:style-name="Таблица1.A1" office:value-type="string">
            <text:p text:style-name="P7"><text:span text:style-name="T5">⚡ </text:span><text:span text:style-name="Strong_20_Emphasis"><text:span text:style-name="T6">Гиперактивный режим реального времени</text:span></text:span></text:p>
          </table:table-cell>
          <table:table-cell table:style-name="Таблица1.A1" office:value-type="string">
            <text:p text:style-name="P8">Латентность &lt;100 мс – идеально для трейдинга, IoT, промышленности</text:p>
          </table:table-cell>
        </table:table-row>
        <table:table-row>
          <table:table-cell table:style-name="Таблица1.A1" office:value-type="string">
            <text:p text:style-name="P7"><text:span text:style-name="T5">🎵 </text:span><text:span text:style-name="Strong_20_Emphasis"><text:span text:style-name="T6">Поиск музыки и видео</text:span></text:span></text:p>
          </table:table-cell>
          <table:table-cell table:style-name="Таблица1.A1" office:value-type="string">
            <text:p text:style-name="P8">YouTube Music и YouTube через голос</text:p>
          </table:table-cell>
        </table:table-row>
        <table:table-row>
          <table:table-cell table:style-name="Таблица1.A1" office:value-type="string">
            <text:p text:style-name="P7"><text:span text:style-name="T5">🧠 </text:span><text:span text:style-name="Strong_20_Emphasis"><text:span text:style-name="T6">Локальный ИИ (Ollama)</text:span></text:span></text:p>
          </table:table-cell>
          <table:table-cell table:style-name="Таблица1.A1" office:value-type="string">
            <text:p text:style-name="P8">Отвечает на любые вопросы – полностью офлайн</text:p>
          </table:table-cell>
        </table:table-row>
        <table:table-row>
          <table:table-cell table:style-name="Таблица1.A1" office:value-type="string">
            <text:p text:style-name="P7"><text:span text:style-name="T5">📂 </text:span><text:span text:style-name="Strong_20_Emphasis"><text:span text:style-name="T6">Очистка данных</text:span></text:span></text:p>
          </table:table-cell>
          <table:table-cell table:style-name="Таблица1.A1" office:value-type="string">
            <text:p text:style-name="P8">Автоматическое обнаружение и удаление дубликатов и пропусков</text:p>
          </table:table-cell>
        </table:table-row>
        <table:table-row>
          <table:table-cell table:style-name="Таблица1.A1" office:value-type="string">
            <text:p text:style-name="P7"><text:span text:style-name="T5">🎨 </text:span><text:span text:style-name="Strong_20_Emphasis"><text:span text:style-name="T6">3D-визуализация</text:span></text:span></text:p>
          </table:table-cell>
          <table:table-cell table:style-name="Таблица1.A1" office:value-type="string">
            <text:p text:style-name="P9">Интерактивные 3D-графики с Plotly</text:p>
          </table:table-cell>
        </table:table-row>
      </table:table>
      <text:p text:style-name="Horizontal_20_Line"/>
      <text:h text:style-name="P5" text:outline-level="2"><text:soft-page-break/>🔥 <text:span text:style-name="T4">Чего не умеют другие – но умеет ANNA</text:span>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6">ChatGPT / Claude / Gemini</text:p>
            </table:table-cell>
            <table:table-cell table:style-name="Таблица2.A1" office:value-type="string">
              <text:p text:style-name="P10"><text:span text:style-name="Strong_20_Emphasis"><text:span text:style-name="T6">ANNA AI</text:span></text:span></text:p>
            </table:table-cell>
          </table:table-row>
        </table:table-header-rows>
        <table:table-row>
          <table:table-cell table:style-name="Таблица2.A1" office:value-type="string">
            <text:p text:style-name="P11">❌ <text:span text:style-name="T7">Не умеет анализировать данные</text:span></text:p>
          </table:table-cell>
          <table:table-cell table:style-name="Таблица2.A1" office:value-type="string">
            <text:p text:style-name="P7"><text:span text:style-name="T5">✅ </text:span><text:span text:style-name="Strong_20_Emphasis"><text:span text:style-name="T6">Анализ данных по голосовой команде</text:span></text:span></text:p>
          </table:table-cell>
        </table:table-row>
        <table:table-row>
          <table:table-cell table:style-name="Таблица2.A1" office:value-type="string">
            <text:p text:style-name="P11">❌ <text:span text:style-name="T7">Не умеет машинное обучение</text:span></text:p>
          </table:table-cell>
          <table:table-cell table:style-name="Таблица2.A1" office:value-type="string">
            <text:p text:style-name="P7"><text:span text:style-name="T5">✅ </text:span><text:span text:style-name="Strong_20_Emphasis"><text:span text:style-name="T6">AutoML с 9 моделями</text:span></text:span></text:p>
          </table:table-cell>
        </table:table-row>
        <table:table-row>
          <table:table-cell table:style-name="Таблица2.A1" office:value-type="string">
            <text:p text:style-name="P11">❌ <text:span text:style-name="T7">Нет голосового управления аналитикой</text:span></text:p>
          </table:table-cell>
          <table:table-cell table:style-name="Таблица2.A1" office:value-type="string">
            <text:p text:style-name="P7"><text:span text:style-name="T5">✅ </text:span><text:span text:style-name="Strong_20_Emphasis"><text:span text:style-name="T6">Полное голосовое управление</text:span></text:span></text:p>
          </table:table-cell>
        </table:table-row>
        <table:table-row>
          <table:table-cell table:style-name="Таблица2.A1" office:value-type="string">
            <text:p text:style-name="P11">❌ <text:span text:style-name="T7">Нет режима реального времени</text:span></text:p>
          </table:table-cell>
          <table:table-cell table:style-name="Таблица2.A1" office:value-type="string">
            <text:p text:style-name="P7"><text:span text:style-name="T5">✅ </text:span><text:span text:style-name="Strong_20_Emphasis"><text:span text:style-name="T6">Гиперактивный режим (&lt;100 мс)</text:span></text:span></text:p>
          </table:table-cell>
        </table:table-row>
        <table:table-row>
          <table:table-cell table:style-name="Таблица2.A1" office:value-type="string">
            <text:p text:style-name="P11">❌ <text:span text:style-name="T7">Не умеет искать музыку/видео</text:span></text:p>
          </table:table-cell>
          <table:table-cell table:style-name="Таблица2.A1" office:value-type="string">
            <text:p text:style-name="P7"><text:span text:style-name="T5">✅ </text:span><text:span text:style-name="Strong_20_Emphasis"><text:span text:style-name="T6">Поиск на YouTube Music и YouTube</text:span></text:span></text:p>
          </table:table-cell>
        </table:table-row>
        <table:table-row>
          <table:table-cell table:style-name="Таблица2.A1" office:value-type="string">
            <text:p text:style-name="P11">❌ <text:span text:style-name="T7">Нет локального ИИ (только облако)</text:span></text:p>
          </table:table-cell>
          <table:table-cell table:style-name="Таблица2.A1" office:value-type="string">
            <text:p text:style-name="P7"><text:span text:style-name="T5">✅ </text:span><text:span text:style-name="Strong_20_Emphasis"><text:span text:style-name="T6">Локальный ИИ через Ollama</text:span></text:span></text:p>
          </table:table-cell>
        </table:table-row>
      </table:table>
      <text:p text:style-name="P4"><text:span text:style-name="Emphasis"><text:span text:style-name="T2">ANNA анализирует данные и обучает модели</text:span></text:span></text:p>
      <text:p text:style-name="Horizontal_20_Line"/>
      <text:h text:style-name="P5" text:outline-level="2">🧠 <text:span text:style-name="T4">Сравнение с другими инструментами</text:span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6">Инструмент</text:p>
            </table:table-cell>
            <table:table-cell table:style-name="Таблица3.A1" office:value-type="string">
              <text:p text:style-name="P6">Что умеет</text:p>
            </table:table-cell>
            <table:table-cell table:style-name="Таблица3.A1" office:value-type="string">
              <text:p text:style-name="P6">Чего НЕ умеет</text:p>
            </table:table-cell>
          </table:table-row>
        </table:table-header-rows>
        <table:table-row>
          <table:table-cell table:style-name="Таблица3.A1" office:value-type="string">
            <text:p text:style-name="P7"><text:span text:style-name="Strong_20_Emphasis"><text:span text:style-name="T6">Робот от Nanosemantik</text:span></text:span></text:p>
          </table:table-cell>
          <table:table-cell table:style-name="Таблица3.A1" office:value-type="string">
            <text:p text:style-name="P8">Голосовое управление LLM</text:p>
          </table:table-cell>
          <table:table-cell table:style-name="Таблица3.A1" office:value-type="string">
            <text:p text:style-name="P11">❌ <text:span text:style-name="T7">Анализ данных, ❌ обучение моделей</text:span></text:p>
          </table:table-cell>
        </table:table-row>
        <table:table-row>
          <table:table-cell table:style-name="Таблица3.A1" office:value-type="string">
            <text:p text:style-name="P7"><text:span text:style-name="Strong_20_Emphasis"><text:span text:style-name="T6">h2oGPT с голосом</text:span></text:span></text:p>
          </table:table-cell>
          <table:table-cell table:style-name="Таблица3.A1" office:value-type="string">
            <text:p text:style-name="P8">LLM с голосом</text:p>
          </table:table-cell>
          <table:table-cell table:style-name="Таблица3.A1" office:value-type="string">
            <text:p text:style-name="P11">❌ <text:span text:style-name="T7">Random Forest, ❌ матрица ошибок</text:span></text:p>
          </table:table-cell>
        </table:table-row>
        <table:table-row>
          <table:table-cell table:style-name="Таблица3.A1" office:value-type="string">
            <text:p text:style-name="P7"><text:span text:style-name="Strong_20_Emphasis"><text:span text:style-name="T6">MLZero от AutoGluon</text:span></text:span></text:p>
          </table:table-cell>
          <table:table-cell table:style-name="Таблица3.A1" office:value-type="string">
            <text:p text:style-name="P8">AutoML для программистов</text:p>
          </table:table-cell>
          <table:table-cell table:style-name="Таблица3.A1" office:value-type="string">
            <text:p text:style-name="P11">❌ <text:span text:style-name="T7">Голосовое управление, ❌ готовый ассистент</text:span></text:p>
          </table:table-cell>
        </table:table-row>
        <table:table-row>
          <table:table-cell table:style-name="Таблица3.A1" office:value-type="string">
            <text:p text:style-name="P7"><text:span text:style-name="Strong_20_Emphasis"><text:span text:style-name="T6">ANNA AI</text:span></text:span></text:p>
          </table:table-cell>
          <table:table-cell table:style-name="Таблица3.A1" office:value-type="string">
            <text:p text:style-name="P7"><text:span text:style-name="T5">✅ </text:span><text:span text:style-name="Strong_20_Emphasis"><text:span text:style-name="T6">ВСЁ: анализ данных + ML + голос + реальное время</text:span></text:span></text:p>
          </table:table-cell>
          <table:table-cell table:style-name="Таблица3.A1" office:value-type="string">
            <text:p text:style-name="P12">–</text:p>
          </table:table-cell>
        </table:table-row>
      </table:table>
      <text:p text:style-name="P4"><text:span text:style-name="Emphasis"><text:span text:style-name="T2">«ANNA — единственное полноценное, удобное решение, которое объединяет анализ данных, машинное обучение и голосовое управление в одном интерфейсе.»</text:span></text:span></text:p>
      <text:p text:style-name="Horizontal_20_Line"/>
      <text:h text:style-name="P5" text:outline-level="2">🎯 <text:span text:style-name="T4">Для чего нужна ANNA?</text:span>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6">Сфера</text:p>
            </table:table-cell>
            <table:table-cell table:style-name="Таблица4.A1" office:value-type="string">
              <text:p text:style-name="P6">Пример</text:p>
            </table:table-cell>
          </table:table-row>
        </table:table-header-rows>
        <table:table-row>
          <table:table-cell table:style-name="Таблица4.A1" office:value-type="string">
            <text:p text:style-name="P7"><text:span text:style-name="Strong_20_Emphasis"><text:span text:style-name="T6">Бизнес-аналитика</text:span></text:span></text:p>
          </table:table-cell>
          <table:table-cell table:style-name="Таблица4.A1" office:value-type="string">
            <text:p text:style-name="P8">«Загрузи sales.csv» → «Покажи статистику» → «Обучи модель <text:soft-page-break/>прогнозировать прибыль»</text:p>
          </table:table-cell>
        </table:table-row>
        <table:table-row>
          <table:table-cell table:style-name="Таблица4.A1" office:value-type="string">
            <text:p text:style-name="P7"><text:span text:style-name="Strong_20_Emphasis"><text:span text:style-name="T6">Наука и образование</text:span></text:span></text:p>
          </table:table-cell>
          <table:table-cell table:style-name="Таблица4.A1" office:value-type="string">
            <text:p text:style-name="P8">Студенты загружают данные → Анна анализирует, визуализирует, обучает модели</text:p>
          </table:table-cell>
        </table:table-row>
        <table:table-row>
          <table:table-cell table:style-name="Таблица4.A1" office:value-type="string">
            <text:p text:style-name="P7"><text:span text:style-name="Strong_20_Emphasis"><text:span text:style-name="T6">Личное использование</text:span></text:span></text:p>
          </table:table-cell>
          <table:table-cell table:style-name="Таблица4.A1" office:value-type="string">
            <text:p text:style-name="P8">«Найди песню Rammstein» → «Найди видео Python урок»</text:p>
          </table:table-cell>
        </table:table-row>
      </table:table>
      <text:p text:style-name="Horizontal_20_Line"/>
      <text:h text:style-name="P5" text:outline-level="2">💡 <text:span text:style-name="T4"><text:s/>ANNA</text:span></text:h>
      <text:p text:style-name="P4"><text:span text:style-name="Emphasis"><text:span text:style-name="T2">«ANNA HYPERACTIVE AutoML — это не очередной чат-бот, а </text:span></text:span><text:span text:style-name="Emphasis"><text:span text:style-name="Strong_20_Emphasis"><text:span text:style-name="T1">новая концепция</text:span></text:span></text:span><text:span text:style-name="Emphasis"><text:span text:style-name="T2">: машинное обучение </text:span></text:span><text:span text:style-name="Emphasis"><text:span text:style-name="T8">становится доступным через голос,</text:span></text:span><text:span text:style-name="Emphasis"><text:span text:style-name="T2"> ИИ-ассистент реально работает с данными, а реальное время становится реальностью для обычного Python.»</text:span></text:span></text:p>
      <text:list text:style-name="L1">
        <text:list-item>
          <text:p text:style-name="P13"><text:span text:style-name="Strong_20_Emphasis"><text:span text:style-name="T1">Три дня разработки</text:span></text:span><text:span text:style-name="T2"> – никаких семинаров, выставок или дорогого оборудования</text:span></text:p>
        </text:list-item>
        <text:list-item>
          <text:p text:style-name="P13"><text:span text:style-name="Strong_20_Emphasis"><text:span text:style-name="T1">Четыре столпа:</text:span></text:span><text:span text:style-name="T2"> анализ данных + машинное обучение + голосовое управление + реальное время = ANNA AI</text:span></text:p>
        </text:list-item>
      </text:list>
      <text:p text:style-name="Horizontal_20_Line"/>
      <text:h text:style-name="P5" text:outline-level="2">🖥️ <text:span text:style-name="T4">7 режимов работы</text:span></text:h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6">Режим</text:p>
            </table:table-cell>
            <table:table-cell table:style-name="Таблица5.A1" office:value-type="string">
              <text:p text:style-name="P6">Описание</text:p>
            </table:table-cell>
          </table:table-row>
        </table:table-header-rows>
        <table:table-row>
          <table:table-cell table:style-name="Таблица5.A1" office:value-type="string">
            <text:p text:style-name="P7"><text:span text:style-name="T5">💬 </text:span><text:span text:style-name="Strong_20_Emphasis"><text:span text:style-name="T6">Чат</text:span></text:span></text:p>
          </table:table-cell>
          <table:table-cell table:style-name="Таблица5.A1" office:value-type="string">
            <text:p text:style-name="P8">Общение с Анной + голосовые команды + любые вопросы (Ollama)</text:p>
          </table:table-cell>
        </table:table-row>
        <table:table-row>
          <table:table-cell table:style-name="Таблица5.A1" office:value-type="string">
            <text:p text:style-name="P7"><text:span text:style-name="T5">📊 </text:span><text:span text:style-name="Strong_20_Emphasis"><text:span text:style-name="T6">AutoML</text:span></text:span></text:p>
          </table:table-cell>
          <table:table-cell table:style-name="Таблица5.A1" office:value-type="string">
            <text:p text:style-name="P8">Загрузите файл → выберите целевую колонку → Анна тестирует 9 моделей → сохраните лучшую</text:p>
          </table:table-cell>
        </table:table-row>
        <table:table-row>
          <table:table-cell table:style-name="Таблица5.A1" office:value-type="string">
            <text:p text:style-name="P7"><text:span text:style-name="T5">📂 </text:span><text:span text:style-name="Strong_20_Emphasis"><text:span text:style-name="T6">Данные</text:span></text:span></text:p>
          </table:table-cell>
          <table:table-cell table:style-name="Таблица5.A1" office:value-type="string">
            <text:p text:style-name="P8">Просмотр таблицы, статистика, пропуски, очистка дубликатов</text:p>
          </table:table-cell>
        </table:table-row>
        <table:table-row>
          <table:table-cell table:style-name="Таблица5.A1" office:value-type="string">
            <text:p text:style-name="P7"><text:span text:style-name="T5">🎨 </text:span><text:span text:style-name="Strong_20_Emphasis"><text:span text:style-name="T6">3D</text:span></text:span></text:p>
          </table:table-cell>
          <table:table-cell table:style-name="Таблица5.A1" office:value-type="string">
            <text:p text:style-name="P8">Интерактивная 3D-визуализация (X, Y, Z на выбор)</text:p>
          </table:table-cell>
        </table:table-row>
        <table:table-row>
          <table:table-cell table:style-name="Таблица5.A1" office:value-type="string">
            <text:p text:style-name="P7"><text:span text:style-name="T5">⚡ </text:span><text:span text:style-name="Strong_20_Emphasis"><text:span text:style-name="T6">Гиперактивный</text:span></text:span></text:p>
          </table:table-cell>
          <table:table-cell table:style-name="Таблица5.A1" office:value-type="string">
            <text:p text:style-name="P8">Поток данных в реальном времени (random, trend, sin, market) с латентностью &lt;100 мс</text:p>
          </table:table-cell>
        </table:table-row>
        <table:table-row>
          <table:table-cell table:style-name="Таблица5.A1" office:value-type="string">
            <text:p text:style-name="P7"><text:span text:style-name="T5">🎵 </text:span><text:span text:style-name="Strong_20_Emphasis"><text:span text:style-name="T6">Музыка</text:span></text:span></text:p>
          </table:table-cell>
          <table:table-cell table:style-name="Таблица5.A1" office:value-type="string">
            <text:p text:style-name="P8">Поиск на YouTube Music (текст или голос)</text:p>
          </table:table-cell>
        </table:table-row>
        <table:table-row>
          <table:table-cell table:style-name="Таблица5.A1" office:value-type="string">
            <text:p text:style-name="P7"><text:span text:style-name="T5">📹 </text:span><text:span text:style-name="Strong_20_Emphasis"><text:span text:style-name="T6">Видео</text:span></text:span></text:p>
          </table:table-cell>
          <table:table-cell table:style-name="Таблица5.A1" office:value-type="string">
            <text:p text:style-name="P9">Поиск на YouTube (текст или голос)</text:p>
          </table:table-cell>
        </table:table-row>
      </table:table>
      <text:p text:style-name="Horizontal_20_Line"/>
      <text:h text:style-name="P5" text:outline-level="2"><text:soft-page-break/>🎤 <text:span text:style-name="T4">Голосовые команды (более 50)</text:span></text:h>
      <text:h text:style-name="P14" text:outline-level="3">📊 <text:span text:style-name="T9">Команды для данных</text:span></text:h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6">Команда</text:p>
            </table:table-cell>
            <table:table-cell table:style-name="Таблица6.A1" office:value-type="string">
              <text:p text:style-name="P6">Что делает</text:p>
            </table:table-cell>
          </table:table-row>
        </table:table-header-rows>
        <table:table-row>
          <table:table-cell table:style-name="Таблица6.A1" office:value-type="string">
            <text:p text:style-name="P8">«покажи данные»</text:p>
          </table:table-cell>
          <table:table-cell table:style-name="Таблица6.A1" office:value-type="string">
            <text:p text:style-name="P8">Первые 10 строк таблицы</text:p>
          </table:table-cell>
        </table:table-row>
        <table:table-row>
          <table:table-cell table:style-name="Таблица6.A1" office:value-type="string">
            <text:p text:style-name="P8">«статистика»</text:p>
          </table:table-cell>
          <table:table-cell table:style-name="Таблица6.A1" office:value-type="string">
            <text:p text:style-name="P8">Описательная статистика всех числовых колонок</text:p>
          </table:table-cell>
        </table:table-row>
        <table:table-row>
          <table:table-cell table:style-name="Таблица6.A1" office:value-type="string">
            <text:p text:style-name="P8">«пропуски» / «fehlende werte»</text:p>
          </table:table-cell>
          <table:table-cell table:style-name="Таблица6.A1" office:value-type="string">
            <text:p text:style-name="P8">Найти пустые ячейки</text:p>
          </table:table-cell>
        </table:table-row>
        <table:table-row>
          <table:table-cell table:style-name="Таблица6.A1" office:value-type="string">
            <text:p text:style-name="P8">«размер» / «größe»</text:p>
          </table:table-cell>
          <table:table-cell table:style-name="Таблица6.A1" office:value-type="string">
            <text:p text:style-name="P9">Показать строки × колонки</text:p>
          </table:table-cell>
        </table:table-row>
      </table:table>
      <text:h text:style-name="P14" text:outline-level="3">📈 <text:span text:style-name="T9">Диаграммы</text:span></text:h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6">Команда</text:p>
            </table:table-cell>
            <table:table-cell table:style-name="Таблица7.A1" office:value-type="string">
              <text:p text:style-name="P6">Что делает</text:p>
            </table:table-cell>
          </table:table-row>
        </table:table-header-rows>
        <table:table-row>
          <table:table-cell table:style-name="Таблица7.A1" office:value-type="string">
            <text:p text:style-name="P8">«график» / «диаграмма»</text:p>
          </table:table-cell>
          <table:table-cell table:style-name="Таблица7.A1" office:value-type="string">
            <text:p text:style-name="P8">Линейный график первой числовой колонки</text:p>
          </table:table-cell>
        </table:table-row>
        <table:table-row>
          <table:table-cell table:style-name="Таблица7.A1" office:value-type="string">
            <text:p text:style-name="P8">«гистограмма» / «verteilung»</text:p>
          </table:table-cell>
          <table:table-cell table:style-name="Таблица7.A1" office:value-type="string">
            <text:p text:style-name="P8">Распределение значений</text:p>
          </table:table-cell>
        </table:table-row>
        <table:table-row>
          <table:table-cell table:style-name="Таблица7.A1" office:value-type="string">
            <text:p text:style-name="P8">«корреляция» / «тепловая карта»</text:p>
          </table:table-cell>
          <table:table-cell table:style-name="Таблица7.A1" office:value-type="string">
            <text:p text:style-name="P9">Матрица корреляций как тепловая карта</text:p>
          </table:table-cell>
        </table:table-row>
      </table:table>
      <text:h text:style-name="P14" text:outline-level="3">🤖 <text:span text:style-name="T9">AutoML</text:span></text:h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6">Команда</text:p>
            </table:table-cell>
            <table:table-cell table:style-name="Таблица8.A1" office:value-type="string">
              <text:p text:style-name="P6">Что делает</text:p>
            </table:table-cell>
          </table:table-row>
        </table:table-header-rows>
        <table:table-row>
          <table:table-cell table:style-name="Таблица8.A1" office:value-type="string">
            <text:p text:style-name="P8">«анна выбери лучшую модель»</text:p>
          </table:table-cell>
          <table:table-cell table:style-name="Таблица8.A1" office:value-type="string">
            <text:p text:style-name="P8">Автоматическое обучение на выбранной целевой колонке</text:p>
          </table:table-cell>
        </table:table-row>
        <table:table-row>
          <table:table-cell table:style-name="Таблица8.A1" office:value-type="string">
            <text:p text:style-name="P8">«важность признаков»</text:p>
          </table:table-cell>
          <table:table-cell table:style-name="Таблица8.A1" office:value-type="string">
            <text:p text:style-name="P8">Важность отдельных признаков</text:p>
          </table:table-cell>
        </table:table-row>
        <table:table-row>
          <table:table-cell table:style-name="Таблица8.A1" office:value-type="string">
            <text:p text:style-name="P8">«сохрани модель»</text:p>
          </table:table-cell>
          <table:table-cell table:style-name="Таблица8.A1" office:value-type="string">
            <text:p text:style-name="P15"><text:span text:style-name="T10">Экспорт обученной модели в </text:span><text:span text:style-name="Source_20_Text"><text:span text:style-name="T11">.pkl</text:span></text:span></text:p>
          </table:table-cell>
        </table:table-row>
      </table:table>
      <text:h text:style-name="P14" text:outline-level="3">🎵 <text:span text:style-name="T9">Музыка и видео</text:span></text:h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6">Команда</text:p>
            </table:table-cell>
            <table:table-cell table:style-name="Таблица9.A1" office:value-type="string">
              <text:p text:style-name="P6">Что делает</text:p>
            </table:table-cell>
          </table:table-row>
        </table:table-header-rows>
        <table:table-row>
          <table:table-cell table:style-name="Таблица9.A1" office:value-type="string">
            <text:p text:style-name="P8">«найди песню [название]»</text:p>
          </table:table-cell>
          <table:table-cell table:style-name="Таблица9.A1" office:value-type="string">
            <text:p text:style-name="P8">Поиск на YouTube Music</text:p>
          </table:table-cell>
        </table:table-row>
        <table:table-row>
          <table:table-cell table:style-name="Таблица9.A1" office:value-type="string">
            <text:p text:style-name="P8">«найди видео [тема]»</text:p>
          </table:table-cell>
          <table:table-cell table:style-name="Таблица9.A1" office:value-type="string">
            <text:p text:style-name="P9">Поиск на YouTube</text:p>
          </table:table-cell>
        </table:table-row>
      </table:table>
      <text:h text:style-name="P14" text:outline-level="3"><text:soft-page-break/>⚙️ <text:span text:style-name="T9">Общие</text:span></text:h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6">Команда</text:p>
            </table:table-cell>
            <table:table-cell table:style-name="Таблица10.A1" office:value-type="string">
              <text:p text:style-name="P6">Что делает</text:p>
            </table:table-cell>
          </table:table-row>
        </table:table-header-rows>
        <table:table-row>
          <table:table-cell table:style-name="Таблица10.A1" office:value-type="string">
            <text:p text:style-name="P8">«помощь» / «hilfe»</text:p>
          </table:table-cell>
          <table:table-cell table:style-name="Таблица10.A1" office:value-type="string">
            <text:p text:style-name="P8">Показать все команды</text:p>
          </table:table-cell>
        </table:table-row>
        <table:table-row>
          <table:table-cell table:style-name="Таблица10.A1" office:value-type="string">
            <text:p text:style-name="P8">«включи звук» / «выключи звук»</text:p>
          </table:table-cell>
          <table:table-cell table:style-name="Таблица10.A1" office:value-type="string">
            <text:p text:style-name="P9">Включить/выключить голос Анны</text:p>
          </table:table-cell>
        </table:table-row>
      </table:table>
      <text:p text:style-name="Horizontal_20_Line"/>
      <text:h text:style-name="P5" text:outline-level="2">🧠 <text:span text:style-name="T4">Гиперактивный режим (реальное время, &lt;100 мс)</text:span></text:h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>
            <table:table-cell table:style-name="Таблица11.A1" office:value-type="string">
              <text:p text:style-name="P6">Свойство</text:p>
            </table:table-cell>
            <table:table-cell table:style-name="Таблица11.A1" office:value-type="string">
              <text:p text:style-name="P6">Описание</text:p>
            </table:table-cell>
          </table:table-row>
        </table:table-header-rows>
        <table:table-row>
          <table:table-cell table:style-name="Таблица11.A1" office:value-type="string">
            <text:p text:style-name="P7"><text:span text:style-name="Strong_20_Emphasis"><text:span text:style-name="T6">Поток данных</text:span></text:span></text:p>
          </table:table-cell>
          <table:table-cell table:style-name="Таблица11.A1" office:value-type="string">
            <text:p text:style-name="P8">10–100 мс на итерацию</text:p>
          </table:table-cell>
        </table:table-row>
        <table:table-row>
          <table:table-cell table:style-name="Таблица11.A1" office:value-type="string">
            <text:p text:style-name="P7"><text:span text:style-name="Strong_20_Emphasis"><text:span text:style-name="T6">Контроль латентности</text:span></text:span></text:p>
          </table:table-cell>
          <table:table-cell table:style-name="Таблица11.A1" office:value-type="string">
            <text:p text:style-name="P8">Настраивается (10–200 мс)</text:p>
          </table:table-cell>
        </table:table-row>
        <table:table-row>
          <table:table-cell table:style-name="Таблица11.A1" office:value-type="string">
            <text:p text:style-name="P7"><text:span text:style-name="Strong_20_Emphasis"><text:span text:style-name="T6">Онлайн-дообучение</text:span></text:span></text:p>
          </table:table-cell>
          <table:table-cell table:style-name="Таблица11.A1" office:value-type="string">
            <text:p text:style-name="P8">Автоматическое переобучение каждые N примеров</text:p>
          </table:table-cell>
        </table:table-row>
        <table:table-row>
          <table:table-cell table:style-name="Таблица11.A1" office:value-type="string">
            <text:p text:style-name="P7"><text:span text:style-name="Strong_20_Emphasis"><text:span text:style-name="T6">Режимы симуляции</text:span></text:span></text:p>
          </table:table-cell>
          <table:table-cell table:style-name="Таблица11.A1" office:value-type="string">
            <text:p text:style-name="P8">random, trend, sin, market</text:p>
          </table:table-cell>
        </table:table-row>
        <table:table-row>
          <table:table-cell table:style-name="Таблица11.A1" office:value-type="string">
            <text:p text:style-name="P7"><text:span text:style-name="Strong_20_Emphasis"><text:span text:style-name="T6">Вывод</text:span></text:span></text:p>
          </table:table-cell>
          <table:table-cell table:style-name="Таблица11.A1" office:value-type="string">
            <text:p text:style-name="P9">JSON-отчёт со всеми предсказаниями, действиями и задержками</text:p>
          </table:table-cell>
        </table:table-row>
      </table:table>
      <text:p text:style-name="P3"><text:span text:style-name="Strong_20_Emphasis"><text:span text:style-name="T1">Применение:</text:span></text:span><text:span text:style-name="T2"> трейдинг, IoT, предиктивное обслуживание, робототехника, промышленные контроллеры</text:span></text:p>
      <text:p text:style-name="Horizontal_20_Line"/>
      <text:h text:style-name="P5" text:outline-level="2">🎵 <text:span text:style-name="T4">Поиск музыки и видео</text:span></text:h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6">Особенность</text:p>
            </table:table-cell>
            <table:table-cell table:style-name="Таблица12.A1" office:value-type="string">
              <text:p text:style-name="P6">Детали</text:p>
            </table:table-cell>
          </table:table-row>
        </table:table-header-rows>
        <table:table-row>
          <table:table-cell table:style-name="Таблица12.A1" office:value-type="string">
            <text:p text:style-name="P7"><text:span text:style-name="Strong_20_Emphasis"><text:span text:style-name="T6">Музыка</text:span></text:span></text:p>
          </table:table-cell>
          <table:table-cell table:style-name="Таблица12.A1" office:value-type="string">
            <text:p text:style-name="P8">YouTube Music (бесплатно, без API)</text:p>
          </table:table-cell>
        </table:table-row>
        <table:table-row>
          <table:table-cell table:style-name="Таблица12.A1" office:value-type="string">
            <text:p text:style-name="P7"><text:span text:style-name="Strong_20_Emphasis"><text:span text:style-name="T6">Видео</text:span></text:span></text:p>
          </table:table-cell>
          <table:table-cell table:style-name="Таблица12.A1" office:value-type="string">
            <text:p text:style-name="P8">YouTube (бесплатно)</text:p>
          </table:table-cell>
        </table:table-row>
        <table:table-row>
          <table:table-cell table:style-name="Таблица12.A1" office:value-type="string">
            <text:p text:style-name="P7"><text:span text:style-name="Strong_20_Emphasis"><text:span text:style-name="T6">Голосовой ввод</text:span></text:span></text:p>
          </table:table-cell>
          <table:table-cell table:style-name="Таблица12.A1" office:value-type="string">
            <text:p text:style-name="P8">Русский, немецкий, украинский</text:p>
          </table:table-cell>
        </table:table-row>
        <table:table-row>
          <table:table-cell table:style-name="Таблица12.A1" office:value-type="string">
            <text:p text:style-name="P7"><text:span text:style-name="Strong_20_Emphasis"><text:span text:style-name="T6">Вывод</text:span></text:span></text:p>
          </table:table-cell>
          <table:table-cell table:style-name="Таблица12.A1" office:value-type="string">
            <text:p text:style-name="P9">Название, исполнитель/канал, длительность, прямая ссылка</text:p>
          </table:table-cell>
        </table:table-row>
      </table:table>
      <text:p text:style-name="Horizontal_20_Line"/>
      <text:h text:style-name="P5" text:outline-level="2"><text:soft-page-break/>🛠️ <text:span text:style-name="T4">Установка (под Windows)</text:span></text:h>
      <text:h text:style-name="P16" text:outline-level="3">Системные требования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>
            <table:table-cell table:style-name="Таблица13.A1" office:value-type="string">
              <text:p text:style-name="P6">Компонент</text:p>
            </table:table-cell>
            <table:table-cell table:style-name="Таблица13.A1" office:value-type="string">
              <text:p text:style-name="P6">Минимум</text:p>
            </table:table-cell>
            <table:table-cell table:style-name="Таблица13.A1" office:value-type="string">
              <text:p text:style-name="P6">Рекомендуется</text:p>
            </table:table-cell>
          </table:table-row>
        </table:table-header-rows>
        <table:table-row>
          <table:table-cell table:style-name="Таблица13.A1" office:value-type="string">
            <text:p text:style-name="P8">Python</text:p>
          </table:table-cell>
          <table:table-cell table:style-name="Таблица13.A1" office:value-type="string">
            <text:p text:style-name="P8">3.9+</text:p>
          </table:table-cell>
          <table:table-cell table:style-name="Таблица13.A1" office:value-type="string">
            <text:p text:style-name="P8">3.11+</text:p>
          </table:table-cell>
        </table:table-row>
        <table:table-row>
          <table:table-cell table:style-name="Таблица13.A1" office:value-type="string">
            <text:p text:style-name="P8">ОЗУ</text:p>
          </table:table-cell>
          <table:table-cell table:style-name="Таблица13.A1" office:value-type="string">
            <text:p text:style-name="P8">4 ГБ</text:p>
          </table:table-cell>
          <table:table-cell table:style-name="Таблица13.A1" office:value-type="string">
            <text:p text:style-name="P8">8+ ГБ</text:p>
          </table:table-cell>
        </table:table-row>
        <table:table-row>
          <table:table-cell table:style-name="Таблица13.A1" office:value-type="string">
            <text:p text:style-name="P8">Диск</text:p>
          </table:table-cell>
          <table:table-cell table:style-name="Таблица13.A1" office:value-type="string">
            <text:p text:style-name="P8">2 ГБ</text:p>
          </table:table-cell>
          <table:table-cell table:style-name="Таблица13.A1" office:value-type="string">
            <text:p text:style-name="P8">10+ ГБ</text:p>
          </table:table-cell>
        </table:table-row>
        <table:table-row>
          <table:table-cell table:style-name="Таблица13.A1" office:value-type="string">
            <text:p text:style-name="P8">Интернет</text:p>
          </table:table-cell>
          <table:table-cell table:style-name="Таблица13.A1" office:value-type="string">
            <text:p text:style-name="P8">Для установки</text:p>
          </table:table-cell>
          <table:table-cell table:style-name="Таблица13.A1" office:value-type="string">
            <text:p text:style-name="P9">Для gTTS и YouTube</text:p>
          </table:table-cell>
        </table:table-row>
      </table:table>
      <text:h text:style-name="P16" text:outline-level="3">Шаг 1: Установите Python</text:h>
      <text:p text:style-name="P3"><text:span text:style-name="T2">Скачайте Python с </text:span><text:a xlink:type="simple" xlink:href="https://python.org/" office:target-frame-name="_blank" xlink:show="new" text:style-name="Internet_20_link" text:visited-style-name="Visited_20_Internet_20_Link"><text:span text:style-name="T12">python.org</text:span></text:a><text:span text:style-name="T2">.<text:line-break/>⚠️ </text:span><text:span text:style-name="Strong_20_Emphasis"><text:span text:style-name="T1">Важно:</text:span></text:span><text:span text:style-name="T2"> отметьте «Add Python to PATH».</text:span></text:p>
      <text:h text:style-name="P16" text:outline-level="3">Шаг 2: Скачайте проект</text:h>
      <text:p text:style-name="P17">bash</text:p>
      <text:p text:style-name="P18"><text:span text:style-name="T13">git</text:span> clone https://github.com/yourname/ANNA_AI.git</text:p>
      <text:p text:style-name="P18"><text:span text:style-name="T14">cd</text:span> ANNA_AI</text:p>
      <text:h text:style-name="P16" text:outline-level="3">Шаг 3: Создайте виртуальное окружение (рекомендуется)</text:h>
      <text:p text:style-name="P17">bash</text:p>
      <text:p text:style-name="P18">python <text:span text:style-name="T13">-m</text:span> venv venv</text:p>
      <text:p text:style-name="P18">venv<text:span text:style-name="T15">\</text:span>Scripts<text:span text:style-name="T15">\</text:span>activate <text:s text:c="5"/><text:span text:style-name="T16"># Windows</text:span></text:p>
      <text:p text:style-name="P18"><text:span text:style-name="T14">source</text:span> venv/bin/activate <text:s text:c="2"/><text:span text:style-name="T16"># Linux/macOS</text:span></text:p>
      <text:h text:style-name="P16" text:outline-level="3">Шаг 4: Установите библиотеки</text:h>
      <text:p text:style-name="P17">bash</text:p>
      <text:p text:style-name="P18">pip <text:span text:style-name="T13">install</text:span> <text:span text:style-name="T13">-r</text:span> requirements.txt</text:p>
      <text:p text:style-name="P19">Или напрямую:</text:p>
      <text:p text:style-name="P17"><text:soft-page-break/>bash</text:p>
      <text:p text:style-name="P18">pip <text:span text:style-name="T13">install</text:span> streamlit pandas numpy matplotlib seaborn scikit-learn openpyxl gTTS speechrecognition audio-recorder-streamlit plotly lightgbm catboost shap requests ytmusicapi youtube-search-python</text:p>
      <text:h text:style-name="P16" text:outline-level="3">Шаг 5 (опционально): Ollama для локального ИИ</text:h>
      <text:p text:style-name="P17">bash</text:p>
      <text:p text:style-name="P20"># Скачайте Ollama с https://ollama.com/download</text:p>
      <text:p text:style-name="P21">ollama pull mistral</text:p>
      <text:p text:style-name="P18">ollama serve <text:s text:c="2"/><text:span text:style-name="T16"># в отдельном терминале</text:span></text:p>
      <text:h text:style-name="P16" text:outline-level="3">Шаг 6: Запустите ANNA</text:h>
      <text:p text:style-name="P17">bash</text:p>
      <text:p text:style-name="P18">streamlit run app.py</text:p>
      <text:p text:style-name="P22"><text:span text:style-name="T2">Или дважды кликните на </text:span><text:span text:style-name="Source_20_Text"><text:span text:style-name="T17">run.bat</text:span></text:span><text:span text:style-name="T2">.</text:span></text:p>
      <text:h text:style-name="P16" text:outline-level="3">Шаг 7: Активируйте Анну</text:h>
      <text:p text:style-name="P3"><text:span text:style-name="T2">Нажмите в боковой панели </text:span><text:span text:style-name="Strong_20_Emphasis"><text:span text:style-name="T1">«▶️ Anna starten»</text:span></text:span><text:span text:style-name="T2"> – видео и голосовое приветствие запустятся автоматически.</text:span></text:p>
      <text:p text:style-name="Horizontal_20_Line"/>
      <text:h text:style-name="P5" text:outline-level="2">📁 <text:span text:style-name="T4">Места сохранения</text:span></text:h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6">Что</text:p>
            </table:table-cell>
            <table:table-cell table:style-name="Таблица14.A1" office:value-type="string">
              <text:p text:style-name="P6">Где</text:p>
            </table:table-cell>
          </table:table-row>
        </table:table-header-rows>
        <table:table-row>
          <table:table-cell table:style-name="Таблица14.A1" office:value-type="string">
            <text:p text:style-name="P8">Обученные модели</text:p>
          </table:table-cell>
          <table:table-cell table:style-name="Таблица14.A1" office:value-type="string">
            <text:p text:style-name="P15"><text:span text:style-name="Source_20_Text"><text:span text:style-name="T11">models/saved_models/</text:span></text:span><text:span text:style-name="T10"> (</text:span><text:span text:style-name="Source_20_Text"><text:span text:style-name="T11">.pkl</text:span></text:span><text:span text:style-name="T10">)</text:span></text:p>
          </table:table-cell>
        </table:table-row>
        <table:table-row>
          <table:table-cell table:style-name="Таблица14.A1" office:value-type="string">
            <text:p text:style-name="P8">Графики</text:p>
          </table:table-cell>
          <table:table-cell table:style-name="Таблица14.A1" office:value-type="string">
            <text:p text:style-name="P15"><text:span text:style-name="Source_20_Text"><text:span text:style-name="T11">outputs/plots/</text:span></text:span><text:span text:style-name="T10"> (</text:span><text:span text:style-name="Source_20_Text"><text:span text:style-name="T11">.html</text:span></text:span><text:span text:style-name="T10">)</text:span></text:p>
          </table:table-cell>
        </table:table-row>
        <table:table-row>
          <table:table-cell table:style-name="Таблица14.A1" office:value-type="string">
            <text:p text:style-name="P8">JSON-отчёты</text:p>
          </table:table-cell>
          <table:table-cell table:style-name="Таблица14.A1" office:value-type="string">
            <text:p text:style-name="P15"><text:span text:style-name="Source_20_Text"><text:span text:style-name="T11">outputs/reports/</text:span></text:span></text:p>
          </table:table-cell>
        </table:table-row>
        <table:table-row>
          <table:table-cell table:style-name="Таблица14.A1" office:value-type="string">
            <text:p text:style-name="P8">Загруженные файлы</text:p>
          </table:table-cell>
          <table:table-cell table:style-name="Таблица14.A1" office:value-type="string">
            <text:p text:style-name="P15"><text:span text:style-name="Source_20_Text"><text:span text:style-name="T11">data/uploaded/</text:span></text:span></text:p>
          </table:table-cell>
        </table:table-row>
      </table:table>
      <text:p text:style-name="Horizontal_20_Line"/>
      <text:h text:style-name="P5" text:outline-level="2"><text:soft-page-break/>❗ <text:span text:style-name="T4">Частые вопросы</text:span></text:h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6">Вопрос</text:p>
            </table:table-cell>
            <table:table-cell table:style-name="Таблица15.A1" office:value-type="string">
              <text:p text:style-name="P6">Ответ</text:p>
            </table:table-cell>
          </table:table-row>
        </table:table-header-rows>
        <table:table-row>
          <table:table-cell table:style-name="Таблица15.A1" office:value-type="string">
            <text:p text:style-name="P7"><text:span text:style-name="Strong_20_Emphasis"><text:span text:style-name="T6">Анна не говорит?</text:span></text:span></text:p>
          </table:table-cell>
          <table:table-cell table:style-name="Таблица15.A1" office:value-type="string">
            <text:p text:style-name="P8">Установите gTTS, включите звук в боковой панели</text:p>
          </table:table-cell>
        </table:table-row>
        <table:table-row>
          <table:table-cell table:style-name="Таблица15.A1" office:value-type="string">
            <text:p text:style-name="P7"><text:span text:style-name="Strong_20_Emphasis"><text:span text:style-name="T6">Голос не распознаётся?</text:span></text:span></text:p>
          </table:table-cell>
          <table:table-cell table:style-name="Таблица15.A1" office:value-type="string">
            <text:p text:style-name="P15"><text:span text:style-name="T10">Разрешите доступ к микрофону, установите </text:span><text:span text:style-name="Source_20_Text"><text:span text:style-name="T11">audio-recorder-streamlit</text:span></text:span></text:p>
          </table:table-cell>
        </table:table-row>
        <table:table-row>
          <table:table-cell table:style-name="Таблица15.A1" office:value-type="string">
            <text:p text:style-name="P7"><text:span text:style-name="Strong_20_Emphasis"><text:span text:style-name="T6">Ollama не доступен?</text:span></text:span></text:p>
          </table:table-cell>
          <table:table-cell table:style-name="Таблица15.A1" office:value-type="string">
            <text:p text:style-name="P15"><text:span text:style-name="T10">Запустите </text:span><text:span text:style-name="Source_20_Text"><text:span text:style-name="T11">ollama serve</text:span></text:span><text:span text:style-name="T10"> в отдельном терминале</text:span></text:p>
          </table:table-cell>
        </table:table-row>
        <table:table-row>
          <table:table-cell table:style-name="Таблица15.A1" office:value-type="string">
            <text:p text:style-name="P7"><text:span text:style-name="Strong_20_Emphasis"><text:span text:style-name="T6">Нет результатов поиска музыки?</text:span></text:span></text:p>
          </table:table-cell>
          <table:table-cell table:style-name="Таблица15.A1" office:value-type="string">
            <text:p text:style-name="P15"><text:span text:style-name="T10">Выполните </text:span><text:span text:style-name="Source_20_Text"><text:span text:style-name="T11">pip install ytmusicapi</text:span></text:span></text:p>
          </table:table-cell>
        </table:table-row>
        <table:table-row>
          <table:table-cell table:style-name="Таблица15.A1" office:value-type="string">
            <text:p text:style-name="P7"><text:span text:style-name="Strong_20_Emphasis"><text:span text:style-name="T6">Порт 8501 занят?</text:span></text:span></text:p>
          </table:table-cell>
          <table:table-cell table:style-name="Таблица15.A1" office:value-type="string">
            <text:p text:style-name="P15"><text:span text:style-name="Source_20_Text"><text:span text:style-name="T11">streamlit run app.py --server.port 8502</text:span></text:span></text:p>
          </table:table-cell>
        </table:table-row>
        <table:table-row>
          <table:table-cell table:style-name="Таблица15.A1" office:value-type="string">
            <text:p text:style-name="P7"><text:span text:style-name="Strong_20_Emphasis"><text:span text:style-name="T6">Нет 3D-графики?</text:span></text:span></text:p>
          </table:table-cell>
          <table:table-cell table:style-name="Таблица15.A1" office:value-type="string">
            <text:p text:style-name="P9">Plotly установлен – возможно, очистите кэш браузера</text:p>
          </table:table-cell>
        </table:table-row>
      </table:table>
      <text:p text:style-name="Horizontal_20_Line"/>
      <text:h text:style-name="P5" text:outline-level="2">🎉 <text:span text:style-name="T4">Заключение</text:span></text:h>
      <text:p text:style-name="P3"><text:span text:style-name="Strong_20_Emphasis"><text:span text:style-name="T1">ANNA AI</text:span></text:span><text:span text:style-name="T2"> — это не очередной чат-бот, а:</text:span></text:p>
      <text:list text:style-name="L2">
        <text:list-item>
          <text:p text:style-name="P23"><text:span text:style-name="T3">📊 </text:span><text:span text:style-name="Strong_20_Emphasis"><text:span text:style-name="T1">Инструмент Data Science</text:span></text:span><text:span text:style-name="T2"> с голосовым управлением</text:span></text:p>
        </text:list-item>
        <text:list-item>
          <text:p text:style-name="P23"><text:span text:style-name="T3">🤖 </text:span><text:span text:style-name="Strong_20_Emphasis"><text:span text:style-name="T1">AutoML для всех</text:span></text:span><text:span text:style-name="T2"> – без программирования</text:span></text:p>
        </text:list-item>
        <text:list-item>
          <text:p text:style-name="P23"><text:span text:style-name="T3">🎤 </text:span><text:span text:style-name="Strong_20_Emphasis"><text:span text:style-name="T1">Голосовой ассистент</text:span></text:span><text:span text:style-name="T2"> для анализа данных и машинного обучения</text:span></text:p>
        </text:list-item>
        <text:list-item>
          <text:p text:style-name="P23"><text:span text:style-name="T3">⚡ </text:span><text:span text:style-name="Strong_20_Emphasis"><text:span text:style-name="T1">Система реального времени</text:span></text:span><text:span text:style-name="T2"> для потоковых данных (&lt;100 мс)</text:span></text:p>
        </text:list-item>
        <text:list-item>
          <text:p text:style-name="P23"><text:span text:style-name="T3">🎵 </text:span><text:span text:style-name="Strong_20_Emphasis"><text:span text:style-name="T1">Мультимедийный центр</text:span></text:span><text:span text:style-name="T2"> для музыки и видео</text:span></text:p>
        </text:list-item>
        <text:list-item>
          <text:p text:style-name="P23"><text:span text:style-name="T3">🖐️ </text:span><text:span text:style-name="Strong_20_Emphasis"><text:span text:style-name="T1">Доступность</text:span></text:span><text:span text:style-name="T2"> – полноценная замена мыши через управление жестами</text:span></text:p>
        </text:list-item>
      </text:list>
      <text:p text:style-name="P4"><text:span text:style-name="T3">💡 </text:span><text:span text:style-name="Emphasis"><text:span text:style-name="T2">«Машинное обучение становится доступным по голосовой команде. ИИ-ассистент реально работает с данными. Реальное время становится реальностью для обычного Python.»</text:span></text:span></text:p>
      <text:p text:style-name="Horizontal_20_Line"/>
      <text:h text:style-name="P5" text:outline-level="2">📄 <text:span text:style-name="T4">Лицензия</text:span></text:h>
      <text:p text:style-name="P19">MIT – свободно для частного и коммерческого использования.</text:p>
      <text:p text:style-name="Horizontal_20_Line"/>
      <text:h text:style-name="P5" text:outline-level="2"><text:soft-page-break/>🤝 <text:span text:style-name="T4">Участие в разработке</text:span></text:h>
      <text:p text:style-name="P19">Pull-приветствуются! Для крупных изменений сначала откройте issue.</text:p>
      <text:p text:style-name="Horizontal_20_Line"/>
      <text:p text:style-name="P24"><text:span text:style-name="Strong_20_Emphasis"><text:span text:style-name="T1">Создано с </text:span></text:span><text:span text:style-name="Strong_20_Emphasis"><text:span text:style-name="T18">❤️</text:span></text:span><text:span text:style-name="Strong_20_Emphasis"><text:span text:style-name="T1"> для всех, кто ищет умного, голосоуправляемого ИИ-ассистента для анализа данных и машинного обучения.</text:span></text:span></text:p>
      <text:p text:style-name="P25">________________________________________________________________________________</text:p>
      <text:p text:style-name="P25"/>
      <text:h text:style-name="P26" text:outline-level="2"> <text:span text:style-name="T4">Projektbeschreibung: TELC Deutsch B2 Prüfungsvorbereitung</text:span></text:h>
      <text:h text:style-name="P27" text:outline-level="3">Überblick</text:h>
      <text:p text:style-name="P28"><text:span text:style-name="T2">Dieses Projekt ist eine interaktive Webanwendung zur Vorbereitung auf die </text:span><text:span text:style-name="Strong_20_Emphasis"><text:span text:style-name="T1">TELC Deutsch B2 Prüfung</text:span></text:span><text:span text:style-name="T2">. Die Anwendung wurde mit </text:span><text:span text:style-name="Strong_20_Emphasis"><text:span text:style-name="T1">Streamlit</text:span></text:span><text:span text:style-name="T2"> (Python) entwickelt und bietet 11 verschiedene Lernmodule, die alle Prüfungsteile abdecken.</text:span></text:p>
      <text:p text:style-name="P29"/>
      <text:h text:style-name="P27" text:outline-level="3">Hauptfunktionen</text:h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P6">Modul</text:p>
            </table:table-cell>
            <table:table-cell table:style-name="Таблица16.A1" office:value-type="string">
              <text:p text:style-name="P6">Beschreibung</text:p>
            </table:table-cell>
          </table:table-row>
        </table:table-header-rows>
        <table:table-row>
          <table:table-cell table:style-name="Таблица16.A2" office:value-type="string">
            <text:p text:style-name="P7"><text:span text:style-name="Strong_20_Emphasis"><text:span text:style-name="T5">💬 </text:span></text:span><text:span text:style-name="Strong_20_Emphasis"><text:span text:style-name="T6">Chat mit Anna</text:span></text:span></text:p>
          </table:table-cell>
          <table:table-cell table:style-name="Таблица16.A2" office:value-type="string">
            <text:p text:style-name="P8">Ein KI-gestützter Chat mit der virtuellen Assistentin "Anna" auf Deutsch</text:p>
          </table:table-cell>
        </table:table-row>
        <table:table-row>
          <table:table-cell table:style-name="Таблица16.A2" office:value-type="string">
            <text:p text:style-name="P7"><text:span text:style-name="Strong_20_Emphasis"><text:span text:style-name="T5">📚 </text:span></text:span><text:span text:style-name="Strong_20_Emphasis"><text:span text:style-name="T6">Wörterbuch B2</text:span></text:span></text:p>
          </table:table-cell>
          <table:table-cell table:style-name="Таблица16.A2" office:value-type="string">
            <text:p text:style-name="P8">Über 200 B2-Wörter mit Übersetzungen und Beispielsätzen</text:p>
          </table:table-cell>
        </table:table-row>
        <table:table-row>
          <table:table-cell table:style-name="Таблица16.A2" office:value-type="string">
            <text:p text:style-name="P7"><text:span text:style-name="Strong_20_Emphasis"><text:span text:style-name="T5">🎯 </text:span></text:span><text:span text:style-name="Strong_20_Emphasis"><text:span text:style-name="T6">Wortschatztest</text:span></text:span></text:p>
          </table:table-cell>
          <table:table-cell table:style-name="Таблица16.A2" office:value-type="string">
            <text:p text:style-name="P8">Interaktive Quizfragen zum Lernen des Wortschatzes</text:p>
          </table:table-cell>
        </table:table-row>
        <table:table-row>
          <table:table-cell table:style-name="Таблица16.A2" office:value-type="string">
            <text:p text:style-name="P7"><text:span text:style-name="Strong_20_Emphasis"><text:span text:style-name="T5">🎤 </text:span></text:span><text:span text:style-name="Strong_20_Emphasis"><text:span text:style-name="T6">Sprachübersetzer</text:span></text:span></text:p>
          </table:table-cell>
          <table:table-cell table:style-name="Таблица16.A2" office:value-type="string">
            <text:p text:style-name="P8">Sprachgesteuerte Übersetzung von Russisch nach Deutsch</text:p>
          </table:table-cell>
        </table:table-row>
        <table:table-row>
          <table:table-cell table:style-name="Таблица16.A2" office:value-type="string">
            <text:p text:style-name="P7"><text:span text:style-name="Strong_20_Emphasis"><text:span text:style-name="T5">📝 </text:span></text:span><text:span text:style-name="Strong_20_Emphasis"><text:span text:style-name="T6">Grammatik B2</text:span></text:span></text:p>
          </table:table-cell>
          <table:table-cell table:style-name="Таблица16.A2" office:value-type="string">
            <text:p text:style-name="P8">Theorie und Beispiele zu Konjunktiv II, Passiv, Nebensätzen, Genitiv-Präpositionen</text:p>
          </table:table-cell>
        </table:table-row>
        <table:table-row>
          <table:table-cell table:style-name="Таблица16.A2" office:value-type="string">
            <text:p text:style-name="P7"><text:span text:style-name="Strong_20_Emphasis"><text:span text:style-name="T5">📖 </text:span></text:span><text:span text:style-name="Strong_20_Emphasis"><text:span text:style-name="T6">Leseverstehen Teil 1</text:span></text:span></text:p>
          </table:table-cell>
          <table:table-cell table:style-name="Таблица16.A2" office:value-type="string">
            <text:p text:style-name="P8">Globalverstehen – Texte mit passenden Überschriften kombinieren</text:p>
          </table:table-cell>
        </table:table-row>
        <table:table-row>
          <table:table-cell table:style-name="Таблица16.A2" office:value-type="string">
            <text:p text:style-name="P7"><text:span text:style-name="Strong_20_Emphasis"><text:span text:style-name="T5">📖 </text:span></text:span><text:span text:style-name="Strong_20_Emphasis"><text:span text:style-name="T6">Leseverstehen Teil 2</text:span></text:span></text:p>
          </table:table-cell>
          <table:table-cell table:style-name="Таблица16.A2" office:value-type="string">
            <text:p text:style-name="P8">Detailverstehen – Fragen zu einem Text beantworten</text:p>
          </table:table-cell>
        </table:table-row>
        <table:table-row>
          <table:table-cell table:style-name="Таблица16.A2" office:value-type="string">
            <text:p text:style-name="P7"><text:span text:style-name="Strong_20_Emphasis"><text:span text:style-name="T5">🔤 </text:span></text:span><text:span text:style-name="Strong_20_Emphasis"><text:span text:style-name="T6">Sprachbausteine Teil 1</text:span></text:span></text:p>
          </table:table-cell>
          <table:table-cell table:style-name="Таблица16.A2" office:value-type="string">
            <text:p text:style-name="P8">Grammatiklücken in einem Text füllen</text:p>
          </table:table-cell>
        </table:table-row>
        <text:soft-page-break/>
        <table:table-row>
          <table:table-cell table:style-name="Таблица16.A2" office:value-type="string">
            <text:p text:style-name="P7"><text:span text:style-name="Strong_20_Emphasis"><text:span text:style-name="T5">🔤 </text:span></text:span><text:span text:style-name="Strong_20_Emphasis"><text:span text:style-name="T6">Sprachbausteine Teil 2</text:span></text:span></text:p>
          </table:table-cell>
          <table:table-cell table:style-name="Таблица16.A2" office:value-type="string">
            <text:p text:style-name="P8">Lexikalische Lücken mit vorgegebenen Wörtern füllen</text:p>
          </table:table-cell>
        </table:table-row>
        <table:table-row>
          <table:table-cell table:style-name="Таблица16.A2" office:value-type="string">
            <text:p text:style-name="P7"><text:span text:style-name="Strong_20_Emphasis"><text:span text:style-name="T5">✍️ </text:span></text:span><text:span text:style-name="Strong_20_Emphasis"><text:span text:style-name="T6">Schriftlicher Ausdruck</text:span></text:span></text:p>
          </table:table-cell>
          <table:table-cell table:style-name="Таблица16.A2" office:value-type="string">
            <text:p text:style-name="P8">Übung zum Verfassen von Briefen (Bewerbung, Beschwerde)</text:p>
          </table:table-cell>
        </table:table-row>
        <table:table-row>
          <table:table-cell table:style-name="Таблица16.A2" office:value-type="string">
            <text:p text:style-name="P7"><text:span text:style-name="Strong_20_Emphasis"><text:span text:style-name="T5">🎤 </text:span></text:span><text:span text:style-name="Strong_20_Emphasis"><text:span text:style-name="T6">Mündliche Prüfung</text:span></text:span></text:p>
          </table:table-cell>
          <table:table-cell table:style-name="Таблица16.A2" office:value-type="string">
            <text:p text:style-name="P9">Training für Präsentation, Diskussion und Problemlösung</text:p>
          </table:table-cell>
        </table:table-row>
      </table:table>
      <text:p text:style-name="P29"/>
      <text:h text:style-name="P27" text:outline-level="3">Technische Details</text:h>
      <text:list text:style-name="L3">
        <text:list-item>
          <text:p text:style-name="P30"><text:span text:style-name="Strong_20_Emphasis"><text:span text:style-name="T1">Framework:</text:span></text:span><text:span text:style-name="T2"> Streamlit (Python)</text:span></text:p>
        </text:list-item>
        <text:list-item>
          <text:p text:style-name="P30"><text:span text:style-name="Strong_20_Emphasis"><text:span text:style-name="T1">KI-Integration:</text:span></text:span><text:span text:style-name="T2"> Ollama (lokale LLM-Modelle)</text:span></text:p>
        </text:list-item>
        <text:list-item>
          <text:p text:style-name="P30"><text:span text:style-name="Strong_20_Emphasis"><text:span text:style-name="T1">Text-to-Speech:</text:span></text:span><text:span text:style-name="T2"> gTTS (Google Text-to-Speech) für Deutsch</text:span></text:p>
        </text:list-item>
        <text:list-item>
          <text:p text:style-name="P30"><text:span text:style-name="Strong_20_Emphasis"><text:span text:style-name="T1">Spracherkennung:</text:span></text:span><text:span text:style-name="T2"> SpeechRecognition (Google Speech API)</text:span></text:p>
        </text:list-item>
        <text:list-item>
          <text:p text:style-name="P31"><text:span text:style-name="Strong_20_Emphasis"><text:span text:style-name="T1">Daten:</text:span></text:span><text:span text:style-name="T2"> Eigene Wortdatenbank (</text:span><text:span text:style-name="Source_20_Text"><text:span text:style-name="T17">words_b2.py</text:span></text:span><text:span text:style-name="T2">)</text:span></text:p>
        </text:list-item>
      </text:list>
      <text:p text:style-name="P29"/>
      <text:h text:style-name="P27" text:outline-level="3">Besonderheiten</text:h>
      <text:list text:style-name="L4">
        <text:list-item>
          <text:p text:style-name="P32"><text:span text:style-name="T3">🎬 </text:span><text:span text:style-name="Strong_20_Emphasis"><text:span text:style-name="T1">Virtuelle Assistentin "Anna"</text:span></text:span><text:span text:style-name="T2"> – Begrüßungsvideo mit Sprachausgabe</text:span></text:p>
        </text:list-item>
        <text:list-item>
          <text:p text:style-name="P32"><text:span text:style-name="T3">🔊 </text:span><text:span text:style-name="Strong_20_Emphasis"><text:span text:style-name="T1">Aussprachetraining</text:span></text:span><text:span text:style-name="T2"> – Jedes Wort und jeder Satz kann vorgelesen werden</text:span></text:p>
        </text:list-item>
        <text:list-item>
          <text:p text:style-name="P32"><text:span text:style-name="T3">📊 </text:span><text:span text:style-name="Strong_20_Emphasis"><text:span text:style-name="T1">Fortschrittsanzeige</text:span></text:span><text:span text:style-name="T2"> – Verfolgung der gelernten Wörter</text:span></text:p>
        </text:list-item>
        <text:list-item>
          <text:p text:style-name="P32"><text:span text:style-name="T3">🎯 </text:span><text:span text:style-name="Strong_20_Emphasis"><text:span text:style-name="T1">TELC-orientiert</text:span></text:span><text:span text:style-name="T2"> – Alle Übungen entsprechen dem echten Prüfungsformat</text:span></text:p>
        </text:list-item>
      </text:list>
      <text:p text:style-name="P29"/>
      <text:h text:style-name="P27" text:outline-level="3">Voraussetzungen</text:h>
      <text:p text:style-name="P33">bash</text:p>
      <text:p text:style-name="P34"># Ollama muss lokal laufen (für KI-Funktionen)</text:p>
      <text:p text:style-name="P35">ollama serve</text:p>
      <text:p text:style-name="P36"/>
      <text:p text:style-name="P34"># Empfohlene Modelle</text:p>
      <text:p text:style-name="P35">ollama pull llama3.2</text:p>
      <text:p text:style-name="P35">ollama pull mistral</text:p>
      <text:p text:style-name="P29"/>
      <text:h text:style-name="P27" text:outline-level="3"><text:soft-page-break/>Zukünftige Erweiterungen</text:h>
      <text:list text:style-name="L5">
        <text:list-item>
          <text:p text:style-name="P37">✅ <text:span text:style-name="T19">Automatische Bewertung von Schreibaufgaben mit KI</text:span></text:p>
        </text:list-item>
        <text:list-item>
          <text:p text:style-name="P37">✅ <text:span text:style-name="T19">Erweiterte Auswertung der mündlichen Prüfung</text:span></text:p>
        </text:list-item>
        <text:list-item>
          <text:p text:style-name="P37">✅ <text:span text:style-name="T19">Mehr Grammatikübungen (B2/C1)</text:span></text:p>
        </text:list-item>
        <text:list-item>
          <text:p text:style-name="P37">✅ <text:span text:style-name="T19">Lernkartei-System (Spaced Repetition)</text:span></text:p>
        </text:list-item>
        <text:list-item>
          <text:p text:style-name="P37">✅ <text:span text:style-name="T19">Export-Funktion für Lernfortschritte</text:span></text:p>
        </text:list-item>
      </text:list>
      <text:p text:style-name="P29"/>
      <text:h text:style-name="P27" text:outline-level="3">Zielgruppe</text:h>
      <text:list text:style-name="L6">
        <text:list-item>
          <text:p text:style-name="P38"><text:span text:style-name="T2">Deutschlernende auf </text:span><text:span text:style-name="Strong_20_Emphasis"><text:span text:style-name="T1">B2-Niveau</text:span></text:span></text:p>
        </text:list-item>
        <text:list-item>
          <text:p text:style-name="P38"><text:span text:style-name="T2">Vorbereitung auf die </text:span><text:span text:style-name="Strong_20_Emphasis"><text:span text:style-name="T1">TELC-Prüfung</text:span></text:span></text:p>
        </text:list-item>
        <text:list-item>
          <text:p text:style-name="P39">Selbstlerner und Sprachschüler</text:p>
        </text:list-item>
      </text:list>
      <text:p text:style-name="P29"/>
      <text:p text:style-name="P40"><text:span text:style-name="Strong_20_Emphasis"><text:span text:style-name="T1">Sprachen:</text:span></text:span><text:span text:style-name="T2"> Deutsch, Russisch (UI auf Russisch für russischsprachige Lernende)</text:span></text:p>
      <text:p text:style-name="P25"/>
      <text:p text:style-name="P41">________________________________________________________________________________</text:p>
      <text:h text:style-name="P42" text:outline-level="2">Опис проєкту: TELC Deutsch B2 Prüfungsvorbereitung</text:h>
      <text:h text:style-name="P43" text:outline-level="3">Загальний огляд</text:h>
      <text:p text:style-name="P44"><text:span text:style-name="T2">Цей проєкт є інтерактивним вебзастосунком для підготовки до </text:span><text:span text:style-name="Strong_20_Emphasis"><text:span text:style-name="T1">іспиту TELC Deutsch B2</text:span></text:span><text:span text:style-name="T2">. Застосунок розроблено з використанням </text:span><text:span text:style-name="Strong_20_Emphasis"><text:span text:style-name="T1">Streamlit</text:span></text:span><text:span text:style-name="T2"> (Python) і пропонує 11 різних навчальних модулів, які охоплюють усі частини іспиту.</text:span></text:p>
      <text:p text:style-name="P45"/>
      <text:h text:style-name="P43" text:outline-level="3">Основні функції</text:h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>
            <table:table-cell table:style-name="Таблица17.A1" office:value-type="string">
              <text:p text:style-name="P6">Модуль</text:p>
            </table:table-cell>
            <table:table-cell table:style-name="Таблица17.A1" office:value-type="string">
              <text:p text:style-name="P6">Опис</text:p>
            </table:table-cell>
          </table:table-row>
        </table:table-header-rows>
        <table:table-row>
          <table:table-cell table:style-name="Таблица17.A2" office:value-type="string">
            <text:p text:style-name="P7"><text:span text:style-name="Strong_20_Emphasis"><text:span text:style-name="T5">💬 </text:span></text:span><text:span text:style-name="Strong_20_Emphasis"><text:span text:style-name="T6">Чат з Анною</text:span></text:span></text:p>
          </table:table-cell>
          <table:table-cell table:style-name="Таблица17.A2" office:value-type="string">
            <text:p text:style-name="P8">Чат з віртуальною асистенткою "Анною" німецькою мовою (з підтримкою ШІ)</text:p>
          </table:table-cell>
        </table:table-row>
        <table:table-row>
          <table:table-cell table:style-name="Таблица17.A2" office:value-type="string">
            <text:p text:style-name="P7"><text:span text:style-name="Strong_20_Emphasis"><text:span text:style-name="T5">📚 </text:span></text:span><text:span text:style-name="Strong_20_Emphasis"><text:span text:style-name="T6">Словник B2</text:span></text:span></text:p>
          </table:table-cell>
          <table:table-cell table:style-name="Таблица17.A2" office:value-type="string">
            <text:p text:style-name="P8">Понад 200 слів рівня B2 з перекладами та прикладами речень</text:p>
          </table:table-cell>
        </table:table-row>
        <table:table-row>
          <table:table-cell table:style-name="Таблица17.A2" office:value-type="string">
            <text:p text:style-name="P7"><text:span text:style-name="Strong_20_Emphasis"><text:span text:style-name="T5">🎯 </text:span></text:span><text:span text:style-name="Strong_20_Emphasis"><text:span text:style-name="T6">Тест слів</text:span></text:span></text:p>
          </table:table-cell>
          <table:table-cell table:style-name="Таблица17.A2" office:value-type="string">
            <text:p text:style-name="P8">Інтерактивні вікторини для вивчення лексики</text:p>
          </table:table-cell>
        </table:table-row>
        <text:soft-page-break/>
        <table:table-row>
          <table:table-cell table:style-name="Таблица17.A2" office:value-type="string">
            <text:p text:style-name="P7"><text:span text:style-name="Strong_20_Emphasis"><text:span text:style-name="T5">🎤 </text:span></text:span><text:span text:style-name="Strong_20_Emphasis"><text:span text:style-name="T6">Голосовий перекладач</text:span></text:span></text:p>
          </table:table-cell>
          <table:table-cell table:style-name="Таблица17.A2" office:value-type="string">
            <text:p text:style-name="P8">Переклад з російської на німецьку через голос</text:p>
          </table:table-cell>
        </table:table-row>
        <table:table-row>
          <table:table-cell table:style-name="Таблица17.A2" office:value-type="string">
            <text:p text:style-name="P7"><text:span text:style-name="Strong_20_Emphasis"><text:span text:style-name="T5">📝 </text:span></text:span><text:span text:style-name="Strong_20_Emphasis"><text:span text:style-name="T6">Граматика B2</text:span></text:span></text:p>
          </table:table-cell>
          <table:table-cell table:style-name="Таблица17.A2" office:value-type="string">
            <text:p text:style-name="P8">Теорія та приклади: Konjunktiv II, Passiv, підрядні речення, прийменники з Genitiv</text:p>
          </table:table-cell>
        </table:table-row>
        <table:table-row>
          <table:table-cell table:style-name="Таблица17.A2" office:value-type="string">
            <text:p text:style-name="P7"><text:span text:style-name="Strong_20_Emphasis"><text:span text:style-name="T5">📖 </text:span></text:span><text:span text:style-name="Strong_20_Emphasis"><text:span text:style-name="T6">Читання. Частина 1</text:span></text:span></text:p>
          </table:table-cell>
          <table:table-cell table:style-name="Таблица17.A2" office:value-type="string">
            <text:p text:style-name="P8">Глобальне розуміння – поєднання текстів із заголовками</text:p>
          </table:table-cell>
        </table:table-row>
        <table:table-row>
          <table:table-cell table:style-name="Таблица17.A2" office:value-type="string">
            <text:p text:style-name="P7"><text:span text:style-name="Strong_20_Emphasis"><text:span text:style-name="T5">📖 </text:span></text:span><text:span text:style-name="Strong_20_Emphasis"><text:span text:style-name="T6">Читання. Частина 2</text:span></text:span></text:p>
          </table:table-cell>
          <table:table-cell table:style-name="Таблица17.A2" office:value-type="string">
            <text:p text:style-name="P8">Детальне розуміння – відповіді на питання до тексту</text:p>
          </table:table-cell>
        </table:table-row>
        <table:table-row>
          <table:table-cell table:style-name="Таблица17.A2" office:value-type="string">
            <text:p text:style-name="P7"><text:span text:style-name="Strong_20_Emphasis"><text:span text:style-name="T5">🔤 </text:span></text:span><text:span text:style-name="Strong_20_Emphasis"><text:span text:style-name="T6">Мовні засоби. Частина 1</text:span></text:span></text:p>
          </table:table-cell>
          <table:table-cell table:style-name="Таблица17.A2" office:value-type="string">
            <text:p text:style-name="P8">Заповнення граматичних пропусків у тексті</text:p>
          </table:table-cell>
        </table:table-row>
        <table:table-row>
          <table:table-cell table:style-name="Таблица17.A2" office:value-type="string">
            <text:p text:style-name="P7"><text:span text:style-name="Strong_20_Emphasis"><text:span text:style-name="T5">🔤 </text:span></text:span><text:span text:style-name="Strong_20_Emphasis"><text:span text:style-name="T6">Мовні засоби. Частина 2</text:span></text:span></text:p>
          </table:table-cell>
          <table:table-cell table:style-name="Таблица17.A2" office:value-type="string">
            <text:p text:style-name="P8">Заповнення лексичних пропусків заданими словами</text:p>
          </table:table-cell>
        </table:table-row>
        <table:table-row>
          <table:table-cell table:style-name="Таблица17.A2" office:value-type="string">
            <text:p text:style-name="P7"><text:span text:style-name="Strong_20_Emphasis"><text:span text:style-name="T5">✍️ </text:span></text:span><text:span text:style-name="Strong_20_Emphasis"><text:span text:style-name="T6">Письмо</text:span></text:span></text:p>
          </table:table-cell>
          <table:table-cell table:style-name="Таблица17.A2" office:value-type="string">
            <text:p text:style-name="P8">Практика написання листів (заява, скарга)</text:p>
          </table:table-cell>
        </table:table-row>
        <table:table-row>
          <table:table-cell table:style-name="Таблица17.A2" office:value-type="string">
            <text:p text:style-name="P7"><text:span text:style-name="Strong_20_Emphasis"><text:span text:style-name="T5">🎤 </text:span></text:span><text:span text:style-name="Strong_20_Emphasis"><text:span text:style-name="T6">Усна частина</text:span></text:span></text:p>
          </table:table-cell>
          <table:table-cell table:style-name="Таблица17.A2" office:value-type="string">
            <text:p text:style-name="P9">Тренування презентації, дискусії та вирішення проблем</text:p>
          </table:table-cell>
        </table:table-row>
      </table:table>
      <text:p text:style-name="P45"/>
      <text:h text:style-name="P43" text:outline-level="3">Технічні деталі</text:h>
      <text:list text:style-name="L7">
        <text:list-item>
          <text:p text:style-name="P46"><text:span text:style-name="Strong_20_Emphasis"><text:span text:style-name="T1">Фреймворк:</text:span></text:span><text:span text:style-name="T2"> Streamlit (Python)</text:span></text:p>
        </text:list-item>
        <text:list-item>
          <text:p text:style-name="P46"><text:span text:style-name="Strong_20_Emphasis"><text:span text:style-name="T1">Інтеграція з ШІ:</text:span></text:span><text:span text:style-name="T2"> Ollama (локальні LLM-моделі)</text:span></text:p>
        </text:list-item>
        <text:list-item>
          <text:p text:style-name="P46"><text:span text:style-name="Strong_20_Emphasis"><text:span text:style-name="T1">Текст у мовлення:</text:span></text:span><text:span text:style-name="T2"> gTTS (Google Text-to-Speech) для німецької</text:span></text:p>
        </text:list-item>
        <text:list-item>
          <text:p text:style-name="P46"><text:span text:style-name="Strong_20_Emphasis"><text:span text:style-name="T1">Розпізнавання мовлення:</text:span></text:span><text:span text:style-name="T2"> SpeechRecognition (Google Speech API)</text:span></text:p>
        </text:list-item>
        <text:list-item>
          <text:p text:style-name="P47"><text:span text:style-name="Strong_20_Emphasis"><text:span text:style-name="T1">Дані:</text:span></text:span><text:span text:style-name="T2"> Власна база слів (</text:span><text:span text:style-name="Source_20_Text"><text:span text:style-name="T17">words_b2.py</text:span></text:span><text:span text:style-name="T2">)</text:span></text:p>
        </text:list-item>
      </text:list>
      <text:p text:style-name="P45"/>
      <text:h text:style-name="P43" text:outline-level="3">Особливості</text:h>
      <text:list text:style-name="L8">
        <text:list-item>
          <text:p text:style-name="P48"><text:span text:style-name="T3">🎬 </text:span><text:span text:style-name="Strong_20_Emphasis"><text:span text:style-name="T1">Віртуальна асистентка "Анна"</text:span></text:span><text:span text:style-name="T2"> – вітальне відео з голосовим супроводом</text:span></text:p>
        </text:list-item>
        <text:list-item>
          <text:p text:style-name="P48"><text:span text:style-name="T3">🔊 </text:span><text:span text:style-name="Strong_20_Emphasis"><text:span text:style-name="T1">Тренування вимови</text:span></text:span><text:span text:style-name="T2"> – кожне слово та речення можна прослухати</text:span></text:p>
        </text:list-item>
        <text:list-item>
          <text:p text:style-name="P48"><text:span text:style-name="T3">📊 </text:span><text:span text:style-name="Strong_20_Emphasis"><text:span text:style-name="T1">Відстеження прогресу</text:span></text:span><text:span text:style-name="T2"> – підрахунок вивчених слів</text:span></text:p>
        </text:list-item>
        <text:list-item>
          <text:p text:style-name="P48"><text:span text:style-name="T3">🎯 </text:span><text:span text:style-name="Strong_20_Emphasis"><text:span text:style-name="T1">Орієнтація на TELC</text:span></text:span><text:span text:style-name="T2"> – всі вправи відповідають реальному формату іспиту</text:span></text:p>
        </text:list-item>
      </text:list>
      <text:p text:style-name="P45"/>
      <text:h text:style-name="P43" text:outline-level="3">Вимоги для запуску</text:h>
      <text:p text:style-name="P49">bash</text:p>
      <text:p text:style-name="P50"><text:soft-page-break/># Ollama має працювати локально (для функцій ШІ)</text:p>
      <text:p text:style-name="P51">ollama serve</text:p>
      <text:p text:style-name="P52"/>
      <text:p text:style-name="P50"># Рекомендовані моделі</text:p>
      <text:p text:style-name="P51">ollama pull llama3.2</text:p>
      <text:p text:style-name="P51">ollama pull mistral</text:p>
      <text:p text:style-name="P45"/>
      <text:h text:style-name="P43" text:outline-level="3">Майбутні розширення</text:h>
      <text:list text:style-name="L9">
        <text:list-item>
          <text:p text:style-name="P53">✅ <text:span text:style-name="T19">Автоматичне оцінювання письмових завдань за допомогою ШІ</text:span></text:p>
        </text:list-item>
        <text:list-item>
          <text:p text:style-name="P53">✅ <text:span text:style-name="T19">Розширена оцінка усної частини</text:span></text:p>
        </text:list-item>
        <text:list-item>
          <text:p text:style-name="P53">✅ <text:span text:style-name="T19">Більше граматичних вправ (B2/C1)</text:span></text:p>
        </text:list-item>
        <text:list-item>
          <text:p text:style-name="P53">✅ <text:span text:style-name="T19">Система карток для запам'ятовування (інтервальні повторення)</text:span></text:p>
        </text:list-item>
        <text:list-item>
          <text:p text:style-name="P53">✅ <text:span text:style-name="T19">Експорт прогресу навчання</text:span></text:p>
        </text:list-item>
      </text:list>
      <text:p text:style-name="P45"/>
      <text:h text:style-name="P43" text:outline-level="3">Цільова аудиторія</text:h>
      <text:list text:style-name="L10">
        <text:list-item>
          <text:p text:style-name="P54"><text:span text:style-name="T2">Ті, хто вивчає німецьку на </text:span><text:span text:style-name="Strong_20_Emphasis"><text:span text:style-name="T1">рівні B2</text:span></text:span></text:p>
        </text:list-item>
        <text:list-item>
          <text:p text:style-name="P54"><text:span text:style-name="T2">Підготовка до </text:span><text:span text:style-name="Strong_20_Emphasis"><text:span text:style-name="T1">іспиту TELC</text:span></text:span></text:p>
        </text:list-item>
        <text:list-item>
          <text:p text:style-name="P55">Самостійні учні та студенти мовних курсів</text:p>
        </text:list-item>
      </text:list>
      <text:p text:style-name="P45"/>
      <text:p text:style-name="P56"><text:span text:style-name="Strong_20_Emphasis"><text:span text:style-name="T1">Мови інтерфейсу:</text:span></text:span><text:span text:style-name="T2"> українська (основна), російська (для російськомовних учнів)<text:line-break/></text:span><text:span text:style-name="Strong_20_Emphasis"><text:span text:style-name="T1">Мова навчання:</text:span></text:span><text:span text:style-name="T2"> німецька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9:39:47.510163200</meta:creation-date>
    <dc:date>2026-06-08T16:39:59.817915800</dc:date>
    <meta:editing-duration>PT18M33S</meta:editing-duration>
    <meta:editing-cycles>5</meta:editing-cycles>
    <meta:generator>LibreOffice/25.2.7.2$Windows_X86_64 LibreOffice_project/5cbfd1ab6520636bb5f7b99185aa69bd7456825d</meta:generator>
    <meta:document-statistic meta:table-count="17" meta:image-count="0" meta:object-count="0" meta:page-count="13" meta:paragraph-count="356" meta:word-count="1655" meta:character-count="11782" meta:non-whitespace-character-count="10487"/>
  </office:meta>
</office:document-meta>
</file>